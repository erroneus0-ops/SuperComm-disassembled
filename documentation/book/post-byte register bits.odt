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BitAssignments" style:family="table">
      <style:table-properties style:width="6.9153in" fo:margin-left="0.025in" table:align="left" style:may-break-between-rows="true" table:border-model="collapsing"/>
    </style:style>
    <style:style style:name="BitAssignments.A" style:family="table-column">
      <style:table-column-properties style:column-width="0.341in"/>
    </style:style>
    <style:style style:name="BitAssignments.I" style:family="table-column">
      <style:table-column-properties style:column-width="2.0014in"/>
    </style:style>
    <style:style style:name="BitAssignments.J" style:family="table-column">
      <style:table-column-properties style:column-width="1.0625in"/>
    </style:style>
    <style:style style:name="BitAssignments.K" style:family="table-column">
      <style:table-column-properties style:column-width="1.1236in"/>
    </style:style>
    <style:style style:name="BitAssignments.1" style:family="table-row">
      <style:table-row-properties style:min-row-height="0.3292in" fo:keep-together="auto"/>
    </style:style>
    <style:style style:name="BitAssignments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itAssignments.J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BitAssignments.2" style:family="table-row">
      <style:table-row-properties style:min-row-height="0.3292in"/>
    </style:style>
    <style:style style:name="BitAssignments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BitAssignments.3" style:family="table-row">
      <style:table-row-properties fo:keep-together="auto"/>
    </style:style>
    <style:style style:name="BitAssignments.K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itAssignments.4" style:family="table-row">
      <style:table-row-properties fo:keep-together="auto"/>
    </style:style>
    <style:style style:name="BitAssignments.5" style:family="table-row">
      <style:table-row-properties fo:keep-together="auto"/>
    </style:style>
    <style:style style:name="BitAssignments.6" style:family="table-row">
      <style:table-row-properties fo:keep-together="auto"/>
    </style:style>
    <style:style style:name="BitAssignments.7" style:family="table-row">
      <style:table-row-properties fo:keep-together="auto"/>
    </style:style>
    <style:style style:name="BitAssignments.8" style:family="table-row">
      <style:table-row-properties fo:keep-together="auto"/>
    </style:style>
    <style:style style:name="BitAssignments.9" style:family="table-row">
      <style:table-row-properties fo:keep-together="auto"/>
    </style:style>
    <style:style style:name="BitAssignments.10" style:family="table-row">
      <style:table-row-properties fo:keep-together="auto"/>
    </style:style>
    <style:style style:name="BitAssignments.11" style:family="table-row">
      <style:table-row-properties fo:keep-together="auto"/>
    </style:style>
    <style:style style:name="BitAssignments.12" style:family="table-row">
      <style:table-row-properties fo:keep-together="auto"/>
    </style:style>
    <style:style style:name="BitAssignments.13" style:family="table-row">
      <style:table-row-properties fo:keep-together="auto"/>
    </style:style>
    <style:style style:name="BitAssignments.14" style:family="table-row">
      <style:table-row-properties fo:keep-together="auto"/>
    </style:style>
    <style:style style:name="BitAssignments.15" style:family="table-row">
      <style:table-row-properties fo:keep-together="auto"/>
    </style:style>
    <style:style style:name="BitAssignments.16" style:family="table-row">
      <style:table-row-properties fo:keep-together="auto"/>
    </style:style>
    <style:style style:name="BitAssignments.17" style:family="table-row">
      <style:table-row-properties fo:keep-together="auto"/>
    </style:style>
    <style:style style:name="BitAssignments.A17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BitAssignments.I17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BitAssignments.18" style:family="table-row">
      <style:table-row-properties fo:keep-together="auto"/>
    </style:style>
    <style:style style:name="BitAssignments.19" style:family="table-row">
      <style:table-row-properties fo:keep-together="auto"/>
    </style:style>
    <style:style style:name="BitAssignments.20" style:family="table-row">
      <style:table-row-properties fo:keep-together="auto"/>
    </style:style>
    <style:style style:name="BitAssignments.21" style:family="table-row">
      <style:table-row-properties fo:keep-together="auto"/>
    </style:style>
    <style:style style:name="BitAssignments.22" style:family="table-row">
      <style:table-row-properties fo:keep-together="auto"/>
    </style:style>
    <style:style style:name="BitAssignments.23" style:family="table-row">
      <style:table-row-properties fo:keep-together="auto"/>
    </style:style>
    <style:style style:name="BitAssignments.24" style:family="table-row">
      <style:table-row-properties fo:keep-together="auto"/>
    </style:style>
    <style:style style:name="BitAssignments.25" style:family="table-row">
      <style:table-row-properties fo:keep-together="auto"/>
    </style:style>
    <style:style style:name="BitAssignments.26" style:family="table-row">
      <style:table-row-properties fo:keep-together="auto"/>
    </style:style>
    <style:style style:name="P1" style:family="paragraph" style:parent-style-name="Text_20_body">
      <style:text-properties style:font-name="Liberation Sans" fo:font-size="16pt" fo:font-weight="bold" officeooo:rsid="0005296a" officeooo:paragraph-rsid="0005296a" style:font-size-asian="16pt" style:font-weight-asian="bold" style:font-size-complex="16pt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5296a" officeooo:paragraph-rsid="000529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officeooo:rsid="0005296a" officeooo:paragraph-rsid="0005296a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e5a4" officeooo:paragraph-rsid="0009e5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5296a" officeooo:paragraph-rsid="000529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705c3" officeooo:paragraph-rsid="000705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102218" officeooo:paragraph-rsid="0010221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officeooo:rsid="00102218" officeooo:paragraph-rsid="0010221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9e5a4" officeooo:paragraph-rsid="0009e5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b4abf" officeooo:paragraph-rsid="000b4a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b4abf" officeooo:paragraph-rsid="000b4a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45a9" officeooo:paragraph-rsid="00084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bf161" officeooo:paragraph-rsid="000bf1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d8f19" officeooo:paragraph-rsid="000d8f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e65a5" officeooo:paragraph-rsid="000e65a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705c3" officeooo:paragraph-rsid="0007ce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705c3" officeooo:paragraph-rsid="00084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add7" officeooo:paragraph-rsid="0008ad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845a9" officeooo:paragraph-rsid="000845a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Consolas" fo:font-size="9pt" fo:font-style="normal" fo:text-shadow="none" style:text-underline-style="none" fo:font-weight="normal" officeooo:rsid="000eb8a4" officeooo:paragraph-rsid="000eb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right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705c3" officeooo:paragraph-rsid="000705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5a9" officeooo:paragraph-rsid="00084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5a9" officeooo:paragraph-rsid="00084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right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add7" officeooo:paragraph-rsid="0008ad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right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45a9" officeooo:paragraph-rsid="00084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45a9" officeooo:paragraph-rsid="00084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add7" officeooo:paragraph-rsid="0008ad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dd7" officeooo:paragraph-rsid="0008ad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/>
    </style:style>
    <style:style style:name="T1" style:family="text">
      <style:text-properties officeooo:rsid="000705c3"/>
    </style:style>
    <style:style style:name="T2" style:family="text">
      <style:text-properties officeooo:rsid="0007cea9"/>
    </style:style>
    <style:style style:name="T3" style:family="text">
      <style:text-properties officeooo:rsid="000845a9"/>
    </style:style>
    <style:style style:name="T4" style:family="text">
      <style:text-properties officeooo:rsid="000b4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 Assignments</text:p>
      <table:table table:name="BitAssignments" table:style-name="BitAssignments" table:template-name="Default Style">
        <table:table-column table:style-name="BitAssignments.A" table:number-columns-repeated="8"/>
        <table:table-column table:style-name="BitAssignments.I"/>
        <table:table-column table:style-name="BitAssignments.J"/>
        <table:table-column table:style-name="BitAssignments.K"/>
        <table:table-row table:style-name="BitAssignments.1">
          <table:table-cell table:style-name="BitAssignments.A1" table:number-columns-spanned="8" office:value-type="string">
            <text:p text:style-name="P2">POST-BYTE REGISTER 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A1" table:number-rows-spanned="2" office:value-type="string">
            <text:p text:style-name="P3">INDEXED<text:line-break/>ADDRESSING<text:line-break/>MODE</text:p>
          </table:table-cell>
          <table:table-cell table:style-name="BitAssignments.J1" table:number-rows-spanned="2" table:number-columns-spanned="2" office:value-type="string">
            <text:p text:style-name="P4">EXAMPLE</text:p>
          </table:table-cell>
          <table:covered-table-cell/>
        </table:table-row>
        <table:table-row table:style-name="BitAssignments.2">
          <table:table-cell table:style-name="BitAssignments.A2" office:value-type="string">
            <text:p text:style-name="P5">7</text:p>
          </table:table-cell>
          <table:table-cell table:style-name="BitAssignments.A2" office:value-type="string">
            <text:p text:style-name="P5">6</text:p>
          </table:table-cell>
          <table:table-cell table:style-name="BitAssignments.A2" office:value-type="string">
            <text:p text:style-name="P5">5</text:p>
          </table:table-cell>
          <table:table-cell table:style-name="BitAssignments.A2" office:value-type="string">
            <text:p text:style-name="P5">4</text:p>
          </table:table-cell>
          <table:table-cell table:style-name="BitAssignments.A2" office:value-type="string">
            <text:p text:style-name="P5">3</text:p>
          </table:table-cell>
          <table:table-cell table:style-name="BitAssignments.A2" office:value-type="string">
            <text:p text:style-name="P5">2</text:p>
          </table:table-cell>
          <table:table-cell table:style-name="BitAssignments.A2" office:value-type="string">
            <text:p text:style-name="P5">1</text:p>
          </table:table-cell>
          <table:table-cell table:style-name="BitAssignments.A2" office:value-type="string">
            <text:p text:style-name="P5">0</text:p>
          </table:table-cell>
          <table:covered-table-cell table:style-name="BitAssignments.A1"/>
          <table:covered-table-cell table:style-name="BitAssignments.J1"/>
          <table:covered-table-cell/>
        </table:table-row>
        <table:table-row table:style-name="BitAssignments.3"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X</text:p>
          </table:table-cell>
          <table:table-cell table:style-name="BitAssignments.A2" office:value-type="string">
            <text:p text:style-name="P6">X</text:p>
          </table:table-cell>
          <table:table-cell table:style-name="BitAssignments.A2" office:value-type="string">
            <text:p text:style-name="P6">X</text:p>
          </table:table-cell>
          <table:table-cell table:style-name="BitAssignments.A2" office:value-type="string">
            <text:p text:style-name="P6">X</text:p>
          </table:table-cell>
          <table:table-cell table:style-name="BitAssignments.A2" office:value-type="string">
            <text:p text:style-name="P6">X</text:p>
          </table:table-cell>
          <table:table-cell table:style-name="BitAssignments.A2" office:value-type="string">
            <text:p text:style-name="P6">EA = ,R±4-BIT OFFSET</text:p>
          </table:table-cell>
          <table:table-cell table:style-name="BitAssignments.A2" office:value-type="string">
            <text:p text:style-name="P7"/>
          </table:table-cell>
          <table:table-cell table:style-name="BitAssignments.K3" office:value-type="string">
            <text:p text:style-name="P8">INDIRECT</text:p>
          </table:table-cell>
        </table:table-row>
        <table:table-row table:style-name="BitAssignments.4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6">0</text:p>
          </table:table-cell>
          <table:table-cell table:style-name="BitAssignments.A2" office:value-type="string">
            <text:p text:style-name="P9">,<text:span text:style-name="T1">R+</text:span></text:p>
          </table:table-cell>
          <table:table-cell table:style-name="BitAssignments.A2" office:value-type="string">
            <text:p text:style-name="P10">LDA ,X+</text:p>
          </table:table-cell>
          <table:table-cell table:style-name="BitAssignments.K3" office:value-type="string">
            <text:p text:style-name="P11"/>
          </table:table-cell>
        </table:table-row>
        <table:table-row table:style-name="BitAssignments.5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>,<text:span text:style-name="T1">R++</text:span></text:p>
          </table:table-cell>
          <table:table-cell table:style-name="BitAssignments.A2" office:value-type="string">
            <text:p text:style-name="P10">LDA ,X++</text:p>
          </table:table-cell>
          <table:table-cell table:style-name="BitAssignments.K3" office:value-type="string">
            <text:p text:style-name="P11">LDA [,X++]</text:p>
          </table:table-cell>
        </table:table-row>
        <table:table-row table:style-name="BitAssignments.6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3">0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>,-<text:span text:style-name="T1">R</text:span></text:p>
          </table:table-cell>
          <table:table-cell table:style-name="BitAssignments.A2" office:value-type="string">
            <text:p text:style-name="P10">LDA ,-X</text:p>
          </table:table-cell>
          <table:table-cell table:style-name="BitAssignments.K3" office:value-type="string">
            <text:p text:style-name="P10"/>
          </table:table-cell>
        </table:table-row>
        <table:table-row table:style-name="BitAssignments.7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>,--<text:span text:style-name="T1">R</text:span></text:p>
          </table:table-cell>
          <table:table-cell table:style-name="BitAssignments.A2" office:value-type="string">
            <text:p text:style-name="P10">LDA ,--X</text:p>
          </table:table-cell>
          <table:table-cell table:style-name="BitAssignments.K3" office:value-type="string">
            <text:p text:style-name="P14">LDA [,--X]</text:p>
          </table:table-cell>
        </table:table-row>
        <table:table-row table:style-name="BitAssignments.8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6">EA = ,R±0 OFFSET</text:p>
          </table:table-cell>
          <table:table-cell table:style-name="BitAssignments.A2" office:value-type="string">
            <text:p text:style-name="P15">LDA ,X</text:p>
          </table:table-cell>
          <table:table-cell table:style-name="BitAssignments.K3" office:value-type="string">
            <text:p text:style-name="P15">LDA [,X]</text:p>
          </table:table-cell>
        </table:table-row>
        <table:table-row table:style-name="BitAssignments.9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6">EA = ,R±<text:span text:style-name="T2">ACCB OFFSET</text:span></text:p>
          </table:table-cell>
          <table:table-cell table:style-name="BitAssignments.A2" office:value-type="string">
            <text:p text:style-name="P16">LDA B,X</text:p>
          </table:table-cell>
          <table:table-cell table:style-name="BitAssignments.K3" office:value-type="string">
            <text:p text:style-name="P16">LDA [B,X]</text:p>
          </table:table-cell>
        </table:table-row>
        <table:table-row table:style-name="BitAssignments.10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7">EA = ,R±<text:span text:style-name="T2">ACCA OFFSET</text:span></text:p>
          </table:table-cell>
          <table:table-cell table:style-name="BitAssignments.A2" office:value-type="string">
            <text:p text:style-name="P16">LDB A,X</text:p>
          </table:table-cell>
          <table:table-cell table:style-name="BitAssignments.K3" office:value-type="string">
            <text:p text:style-name="P16">LDB [A,X]</text:p>
          </table:table-cell>
        </table:table-row>
        <table:table-row table:style-name="BitAssignments.11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8">EA = ,R±<text:span text:style-name="T3">7-BIT</text:span><text:span text:style-name="T2"> OFFSET</text:span></text:p>
          </table:table-cell>
          <table:table-cell table:style-name="BitAssignments.A2" office:value-type="string">
            <text:p text:style-name="P16">LDA $01,X</text:p>
          </table:table-cell>
          <table:table-cell table:style-name="BitAssignments.K3" office:value-type="string">
            <text:p text:style-name="P16">LDA [$01,X]</text:p>
          </table:table-cell>
        </table:table-row>
        <table:table-row table:style-name="BitAssignments.12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8">EA = ,R±<text:span text:style-name="T3">15-BIT</text:span><text:span text:style-name="T2"> OFFSET</text:span></text:p>
          </table:table-cell>
          <table:table-cell table:style-name="BitAssignments.A2" office:value-type="string">
            <text:p text:style-name="P16">LDA $0000,X</text:p>
          </table:table-cell>
          <table:table-cell table:style-name="BitAssignments.K3" office:value-type="string">
            <text:p text:style-name="P16">LDA [$0001,X]</text:p>
          </table:table-cell>
        </table:table-row>
        <table:table-row table:style-name="BitAssignments.13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6">R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8">EA = ,R±<text:span text:style-name="T4">ACC</text:span><text:span text:style-name="T3">D</text:span><text:span text:style-name="T2"> OFFSET</text:span></text:p>
          </table:table-cell>
          <table:table-cell table:style-name="BitAssignments.A2" office:value-type="string">
            <text:p text:style-name="P16">LDY D,X</text:p>
          </table:table-cell>
          <table:table-cell table:style-name="BitAssignments.K3" office:value-type="string">
            <text:p text:style-name="P16">LDY [D,X]</text:p>
          </table:table-cell>
        </table:table-row>
        <table:table-row table:style-name="BitAssignments.14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19">X</text:p>
          </table:table-cell>
          <table:table-cell table:style-name="BitAssignments.A2" office:value-type="string">
            <text:p text:style-name="P19">X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/>
          </table:table-cell>
          <table:table-cell table:style-name="BitAssignments.A2" office:value-type="string">
            <text:p text:style-name="P18">EA = ,<text:span text:style-name="T3">PC</text:span>±<text:span text:style-name="T3">7-BIT</text:span><text:span text:style-name="T2"> OFFSET</text:span></text:p>
          </table:table-cell>
          <table:table-cell table:style-name="BitAssignments.A2" office:value-type="string">
            <text:p text:style-name="P16">LDA $01,PCR</text:p>
          </table:table-cell>
          <table:table-cell table:style-name="BitAssignments.K3" office:value-type="string">
            <text:p text:style-name="P16">LDA [$01,PCR]</text:p>
          </table:table-cell>
        </table:table-row>
        <table:table-row table:style-name="BitAssignments.15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19">X</text:p>
          </table:table-cell>
          <table:table-cell table:style-name="BitAssignments.A2" office:value-type="string">
            <text:p text:style-name="P19">X</text:p>
          </table:table-cell>
          <table:table-cell table:style-name="BitAssignments.A2" office:value-type="string">
            <text:p text:style-name="P12">I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9"/>
          </table:table-cell>
          <table:table-cell table:style-name="BitAssignments.A2" office:value-type="string">
            <text:p text:style-name="P12">1</text:p>
          </table:table-cell>
          <table:table-cell table:style-name="BitAssignments.A2" office:value-type="string">
            <text:p text:style-name="P18">EA = ,<text:span text:style-name="T3">PC</text:span>±<text:span text:style-name="T3">15-BIT</text:span><text:span text:style-name="T2"> OFFSET</text:span></text:p>
          </table:table-cell>
          <table:table-cell table:style-name="BitAssignments.A2" office:value-type="string">
            <text:p text:style-name="P16">LDA $0001,PCR</text:p>
          </table:table-cell>
          <table:table-cell table:style-name="BitAssignments.K3" office:value-type="string">
            <text:p text:style-name="P16">LDA [$0001,PCR]</text:p>
          </table:table-cell>
        </table:table-row>
        <table:table-row table:style-name="BitAssignments.16">
          <table:table-cell table:style-name="BitAssignments.A2" office:value-type="string">
            <text:p text:style-name="P6">1</text:p>
          </table:table-cell>
          <table:table-cell table:style-name="BitAssignments.A2" office:value-type="string">
            <text:p text:style-name="P19">R</text:p>
          </table:table-cell>
          <table:table-cell table:style-name="BitAssignments.A2" office:value-type="string">
            <text:p text:style-name="P19">R</text:p>
          </table:table-cell>
          <table:table-cell table:style-name="BitAssignments.A2" office:value-type="string">
            <text:p text:style-name="P13">1</text:p>
          </table:table-cell>
          <table:table-cell table:style-name="BitAssignments.A2" office:value-type="string">
            <text:p text:style-name="P13">1</text:p>
          </table:table-cell>
          <table:table-cell table:style-name="BitAssignments.A2" office:value-type="string">
            <text:p text:style-name="P13">1</text:p>
          </table:table-cell>
          <table:table-cell table:style-name="BitAssignments.A2" office:value-type="string">
            <text:p text:style-name="P13">1</text:p>
          </table:table-cell>
          <table:table-cell table:style-name="BitAssignments.A2" office:value-type="string">
            <text:p text:style-name="P13">1</text:p>
          </table:table-cell>
          <table:table-cell table:style-name="BitAssignments.A2" office:value-type="string">
            <text:p text:style-name="P13">EA = ,ADDRESS</text:p>
          </table:table-cell>
          <table:table-cell table:style-name="BitAssignments.A2" office:value-type="string">
            <text:p text:style-name="P20"/>
          </table:table-cell>
          <table:table-cell table:style-name="BitAssignments.K3" office:value-type="string">
            <text:p text:style-name="P21">LDA [$0000]</text:p>
          </table:table-cell>
        </table:table-row>
        <table:table-row table:style-name="BitAssignments.17">
          <table:table-cell table:style-name="BitAssignments.A17" office:value-type="string">
            <text:p text:style-name="P22"/>
          </table:table-cell>
          <table:table-cell table:style-name="BitAssignments.A17" table:number-columns-spanned="2" office:value-type="string">
            <text:p text:style-name="P19">\______/</text:p>
          </table:table-cell>
          <table:covered-table-cell/>
          <table:table-cell table:style-name="BitAssignments.A17" office:value-type="string">
            <text:p text:style-name="P19">\__/</text:p>
          </table:table-cell>
          <table:table-cell table:style-name="BitAssignments.A17" table:number-columns-spanned="4" office:value-type="string">
            <text:p text:style-name="P13">\______________/</text:p>
          </table:table-cell>
          <table:covered-table-cell/>
          <table:covered-table-cell/>
          <table:covered-table-cell/>
          <table:table-cell table:style-name="BitAssignments.I17" office:value-type="string">
            <text:p text:style-name="P23"/>
          </table:table-cell>
          <table:table-cell table:style-name="BitAssignments.I17" table:number-columns-spanned="2" office:value-type="string">
            <text:p text:style-name="P24"/>
          </table:table-cell>
          <table:covered-table-cell/>
        </table:table-row>
        <table:table-row table:style-name="BitAssignments.18">
          <table:table-cell table:style-name="BitAssignments.A17" office:value-type="string">
            <text:p text:style-name="P22"/>
          </table:table-cell>
          <table:table-cell table:style-name="BitAssignments.A17" table:number-columns-spanned="2" office:value-type="string">
            <text:p text:style-name="P22"/>
          </table:table-cell>
          <table:covered-table-cell/>
          <table:table-cell table:style-name="BitAssignments.A17" office:value-type="string">
            <text:p text:style-name="P25"/>
          </table:table-cell>
          <table:table-cell table:style-name="BitAssignments.A17" table:number-columns-spanned="4" office:value-type="string">
            <text:p text:style-name="P26">^--------------</text:p>
          </table:table-cell>
          <table:covered-table-cell/>
          <table:covered-table-cell/>
          <table:covered-table-cell/>
          <table:table-cell table:style-name="BitAssignments.I17" office:value-type="string">
            <text:p text:style-name="P27">ADDRESSING MODE FIELD</text:p>
          </table:table-cell>
          <table:table-cell table:style-name="BitAssignments.I17" table:number-columns-spanned="2" office:value-type="string">
            <text:p text:style-name="P24"/>
          </table:table-cell>
          <table:covered-table-cell/>
        </table:table-row>
        <table:table-row table:style-name="BitAssignments.19">
          <table:table-cell table:style-name="BitAssignments.A17" office:value-type="string">
            <text:p text:style-name="P22"/>
          </table:table-cell>
          <table:table-cell table:style-name="BitAssignments.A17" table:number-columns-spanned="2" office:value-type="string">
            <text:p text:style-name="P22"/>
          </table:table-cell>
          <table:covered-table-cell/>
          <table:table-cell table:style-name="BitAssignments.A17" table:number-columns-spanned="5" office:value-type="string">
            <text:p text:style-name="P25">^--------------------------------</text:p>
          </table:table-cell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7">INDIRECT FIELD</text:p>
          </table:table-cell>
          <table:table-cell table:style-name="BitAssignments.I17" table:number-columns-spanned="2" office:value-type="string">
            <text:p text:style-name="P24"/>
          </table:table-cell>
          <table:covered-table-cell/>
        </table:table-row>
        <table:table-row table:style-name="BitAssignments.20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SIGN BIT WHEN B7 = 0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1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>^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REGISTER FIELD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2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<text:s text:c="5"/>00:R = X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3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<text:s text:c="5"/>01:R = Y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4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<text:s text:c="5"/>10:R = U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5">
          <table:table-cell table:style-name="BitAssignments.A17" office:value-type="string">
            <text:p text:style-name="P22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<text:s text:c="5"/>11:R = S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  <table:table-row table:style-name="BitAssignments.26">
          <table:table-cell table:style-name="BitAssignments.A17" office:value-type="string">
            <text:p text:style-name="P25"/>
          </table:table-cell>
          <table:table-cell table:style-name="BitAssignments.A1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itAssignments.I17" office:value-type="string">
            <text:p text:style-name="P28">X = DON’T CARE</text:p>
          </table:table-cell>
          <table:table-cell table:style-name="BitAssignments.I17" table:number-columns-spanned="2" office:value-type="string">
            <text:p text:style-name="P29"/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2T10:36:18.544175000</meta:creation-date>
    <dc:date>2026-07-22T12:29:59.122409000</dc:date>
    <meta:editing-duration>PT29M18S</meta:editing-duration>
    <meta:editing-cycles>8</meta:editing-cycles>
    <meta:generator>LibreOffice/26.2.4.2$Windows_X86_64 LibreOffice_project/0229ac93fcf0d7cbc6376066c6f35021cef002dc</meta:generator>
    <meta:document-statistic meta:table-count="1" meta:image-count="0" meta:object-count="0" meta:page-count="1" meta:paragraph-count="153" meta:word-count="233" meta:character-count="850" meta:non-whitespace-character-count="753"/>
  </office:meta>
</office:document-meta>
</file>